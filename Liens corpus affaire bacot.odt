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Normal">https://www.lamontagne.fr/mauriac-15200/actualites/valerie-bacot-est-venue-raconter-ses-31-annees-de-violences-sexuelles-et-psychologiques-aux-lyceens-de-mauriac-cantal_14118795/</text:p>
      <text:p text:style-name="Normal"/>
      <text:p text:style-name="Normal">https://france3-regions.franceinfo.fr/bourgogne-franche-comte/recit-femme-battue-violee-prostituee-valerie-bacot-tue-son-mari-23-victime-qui-ne-manque-personne-1854240.html</text:p>
      <text:p text:style-name="Normal"/>
      <text:p text:style-name="Normal">https://france3-regions.franceinfo.fr/bourgogne-franche-comte/saone-et-loire/chalon-sur-saone/direct-valerie-bacot-femme-battue-qui-a-tue-son-mari-le-proces-commence-aux-assises-de-saone-et-loire-2142121.html</text:p>
      <text:p text:style-name="Normal"/>
      <text:p text:style-name="Normal">https://www.rtl.fr/actu/justice-faits-divers/crime-de-la-clayette-la-seconde-affaire-jacqueline-sauvage-7791251037</text:p>
      <text:p text:style-name="Normal"/>
      <text:p text:style-name="Normal">https://france3-regions.franceinfo.fr/bourgogne-franche-comte/saone-et-loire/macon/macon-6-mois-prison-sursis-requis-contre-enfants-affaire-clayette-1752567.html</text:p>
      <text:p text:style-name="Normal"/>
      <text:p text:style-name="Normal">https://madame.lefigaro.fr/societe/valerie-bacot-proces-livre-femme-battue-violee-prostituee-par-son-mari-tout-le-monde-savait-230621-197039</text:p>
      <text:p text:style-name="Normal"/>
      <text:p text:style-name="Normal">https://www.info-chalon.com/articles/2021/06/21/50534/assises-de-saone-et-loire-est-ce-que-mme-bacot-vous-avez-voulu-tuer-votre-mari-non-non-vous-vouliez-quoi-me-proteger-de-quoi-de-tout</text:p>
      <text:p text:style-name="Normal"/>
      <text:p text:style-name="Normal">https://www.lejsl.com/faits-divers-justice/2021/06/23/suivez-le-proces-de-valerie-bacot</text:p>
      <text:p text:style-name="Normal"/>
      <text:p text:style-name="Normal">https://www.lejsl.com/faits-divers-justice/2021/06/23/suivez-le-proces-de-valerie-bacot</text:p>
      <text:p text:style-name="Normal"/>
      <text:p text:style-name="Normal">https://web.archive.org/web/20210624204110/https://www.sudradio.fr/societe/la-mere-de-valerie-bacot-parle-damour-avec-son-mari-proxenete/</text:p>
      <text:p text:style-name="Normal"/>
      <text:p text:style-name="Normal">https://www.bfmtv.com/police-justice/une-petition-demande-la-liberte-pour-valerie-bacot-accusee-d-avoir-tue-son-mari-violent_AN-202101190267.html</text:p>
      <text:p text:style-name="Normal"/>
      <text:p text:style-name="Normal">https://france3-regions.franceinfo.fr/bourgogne-franche-comte/saone-et-loire/macon/valerie-bacot-a-nouveau-face-a-la-justice-suite-a-la-plainte-de-sa-mere-pour-diffamation-2308621.html</text:p>
      <text:p text:style-name="Normal"/>
      <text:p text:style-name="Normal">https://www.lepoint.fr/societe/la-mere-de-valerie-bacot-porte-plainte-contre-elle-pour-diffamation-15-07-2021-2435635_23.php</text:p>
      <text:p text:style-name="Normal"/>
      <text:p text:style-name="Normal">https://france3-regions.franceinfo.fr/bourgogne-franche-comte/recit-battue-violee-prostituee-valerie-bacot-tue-son-mari-13-epouse-victime-accusee-1854434.html</text:p>
      <text:p text:style-name="Normal"/>
      <text:p text:style-name="Normal">https://www.20minutes.fr/justice/3064991-20210621-violences-conjugales-valerie-bacot-femme-battue-jugee-assassinat-mari-violent</text:p>
      <text:p text:style-name="Normal"/>
      <text:p text:style-name="Normal">https://www.bfmtv.com/police-justice/proces/en-direct-valerie-bacot-jugee-pour-avoir-tue-son-mari-proxenete-suivez-le-proces_LN-202106210135.html</text:p>
      <text:p text:style-name="Normal"/>
      <text:p text:style-name="Normal">https://www.tf1info.fr/justice-faits-divers/video-replay-tf1-sept-a-huit-l-interview-bouleversante-de-valerie-bacot-jugee-pour-avoir-tue-son-mari-qui-la-tyrannisait-2185510.html</text:p>
      <text:p text:style-name="Normal"/>
      <text:p text:style-name="Normal">https://www.lefigaro.fr/faits-divers/affaire-valerie-bacot-une-petition-pour-obtenir-la-grace-d-une-femme-que-personne-n-a-jamais-protegee-20210121</text:p>
      <text:p text:style-name="Normal"/>
      <text:p text:style-name="Normal">https://www.senat.fr/compte-rendu-commissions/20211101/ddf_bacot.html</text:p>
      <text:p text:style-name="Normal"/>
      <text:p text:style-name="Normal">https://france3-regions.franceinfo.fr/bourgogne-franche-comte/saone-et-loire/chalon-sur-saone/direct-valerie-bacot-elle-est-non-coupable-clame-l-un-des-enfants-de-la-femme-qui-a-tue-son-mari-violent-2147332.html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oline EYSSAUTIER</meta:initial-creator>
    <dc:creator>Coline EYSSAUTIER</dc:creator>
    <meta:creation-date>2026-05-28T12:34:00Z</meta:creation-date>
    <dc:date>2026-05-28T12:34:00Z</dc:date>
    <meta:template xlink:href="Normal.dotm" xlink:type="simple"/>
    <meta:editing-cycles>1</meta:editing-cycles>
    <meta:editing-duration>PT0S</meta:editing-duration>
    <meta:document-statistic meta:page-count="3" meta:paragraph-count="5" meta:word-count="461" meta:character-count="2994" meta:row-count="21" meta:non-whitespace-character-count="2538"/>
  </office:meta>
</office:document-meta>
</file>